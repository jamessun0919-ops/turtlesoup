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5.1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題目</text:p>
          </table:table-cell>
          <table:table-cell office:value-type="string">
            <text:p>簡要說明</text:p>
          </table:table-cell>
          <table:table-cell office:value-type="string">
            <text:p>分類一</text:p>
          </table:table-cell>
          <table:table-cell office:value-type="string">
            <text:p>分類二</text:p>
          </table:table-cell>
          <table:table-cell office:value-type="string">
            <text:p>題目亮點(盲點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新高跟鞋</text:p>
          </table:table-cell>
          <table:table-cell office:value-type="string">
            <text:p>馬戲團飛刀表演</text:p>
          </table:table-cell>
          <table:table-cell table:number-columns-repeated="2"/>
          <table:table-cell office:value-type="string">
            <text:p>職業特殊性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隨手關燈</text:p>
          </table:table-cell>
          <table:table-cell office:value-type="string">
            <text:p>燈塔看守員</text:p>
          </table:table-cell>
          <table:table-cell office:value-type="string">
            <text:p>經典</text:p>
          </table:table-cell>
          <table:table-cell/>
          <table:table-cell office:value-type="string">
            <text:p>職業特殊性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最後大餐</text:p>
          </table:table-cell>
          <table:table-cell office:value-type="string">
            <text:p>蚊子吸血</text:p>
          </table:table-cell>
          <table:table-cell/>
          <table:table-cell office:value-type="string">
            <text:p>日常</text:p>
          </table:table-cell>
          <table:table-cell office:value-type="string">
            <text:p>角色特殊性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離奇死亡</text:p>
          </table:table-cell>
          <table:table-cell office:value-type="string">
            <text:p>破碎金魚缸</text:p>
          </table:table-cell>
          <table:table-cell table:number-columns-repeated="2"/>
          <table:table-cell office:value-type="string">
            <text:p>角色特殊性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絕望歌聲</text:p>
          </table:table-cell>
          <table:table-cell office:value-type="string">
            <text:p>霸王別姬</text:p>
          </table:table-cell>
          <table:table-cell table:number-columns-repeated="2"/>
          <table:table-cell office:value-type="string">
            <text:p>歷史故事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姊妹葬禮</text:p>
          </table:table-cell>
          <table:table-cell/>
          <table:table-cell office:value-type="string">
            <text:p>經典</text:p>
          </table:table-cell>
          <table:table-cell office:value-type="string">
            <text:p>犯罪</text:p>
          </table:table-cell>
          <table:table-cell office:value-type="string">
            <text:p>犯罪心理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焚燒藝術品</text:p>
          </table:table-cell>
          <table:table-cell office:value-type="string">
            <text:p>刺青</text:p>
          </table:table-cell>
          <table:table-cell table:number-columns-repeated="2"/>
          <table:table-cell office:value-type="string">
            <text:p>物品名稱盲點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末日鈴聲</text:p>
          </table:table-cell>
          <table:table-cell table:number-columns-repeated="3"/>
          <table:table-cell office:value-type="string">
            <text:p>日常生活盲點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書裡百鈔</text:p>
          </table:table-cell>
          <table:table-cell table:number-columns-repeated="3"/>
          <table:table-cell office:value-type="string">
            <text:p>價值觀盲點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遛狗之人</text:p>
          </table:table-cell>
          <table:table-cell office:value-type="string">
            <text:p>目擊殺人以為逃過一劫</text:p>
          </table:table-cell>
          <table:table-cell/>
          <table:table-cell office:value-type="string">
            <text:p>日常</text:p>
          </table:table-cell>
          <table:table-cell office:value-type="string">
            <text:p>角色特殊性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兒子葬禮</text:p>
          </table:table-cell>
          <table:table-cell office:value-type="string">
            <text:p>母親殺死兒子的器官受贈者</text:p>
          </table:table-cell>
          <table:table-cell/>
          <table:table-cell office:value-type="string">
            <text:p>犯罪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高樓電梯</text:p>
          </table:table-cell>
          <table:table-cell office:value-type="string">
            <text:p>身高不夠</text:p>
          </table:table-cell>
          <table:table-cell/>
          <table:table-cell office:value-type="string">
            <text:p>日常</text:p>
          </table:table-cell>
          <table:table-cell office:value-type="string">
            <text:p>日常生活盲點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對向黑車</text:p>
          </table:table-cell>
          <table:table-cell office:value-type="string">
            <text:p>路燈故障也無星無月</text:p>
          </table:table-cell>
          <table:table-cell office:value-type="string">
            <text:p>經典</text:p>
          </table:table-cell>
          <table:table-cell office:value-type="string">
            <text:p>日常</text:p>
          </table:table-cell>
          <table:table-cell office:value-type="string">
            <text:p>文字陷阱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銷毀高價品</text:p>
          </table:table-cell>
          <table:table-cell office:value-type="string">
            <text:p>高價票券剪票，持有者仍然高興</text:p>
          </table:table-cell>
          <table:table-cell/>
          <table:table-cell office:value-type="string">
            <text:p>日常</text:p>
          </table:table-cell>
          <table:table-cell office:value-type="string">
            <text:p>文字陷阱／日常生活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渾身血跡的陌生人</text:p>
          </table:table-cell>
          <table:table-cell office:value-type="string">
            <text:p>高速行駛的車裡孕婦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山路巴士</text:p>
          </table:table-cell>
          <table:table-cell office:value-type="string">
            <text:p>下車後的車輛遇到落石</text:p>
          </table:table-cell>
          <table:table-cell/>
          <table:table-cell office:value-type="string">
            <text:p>日常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全班舉手</text:p>
          </table:table-cell>
          <table:table-cell office:value-type="string">
            <text:p>會的人舉右手／不會地舉左手</text:p>
          </table:table-cell>
          <table:table-cell/>
          <table:table-cell office:value-type="string">
            <text:p>日常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固定時間死亡的病床</text:p>
          </table:table-cell>
          <table:table-cell office:value-type="string">
            <text:p>打掃拔插頭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販賣機硬幣殺人</text:p>
          </table:table-cell>
          <table:table-cell office:value-type="string">
            <text:p>硬幣裝在襪子裡</text:p>
          </table:table-cell>
          <table:table-cell/>
          <table:table-cell office:value-type="string">
            <text:p>犯罪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罪犯整形</text:p>
          </table:table-cell>
          <table:table-cell office:value-type="string">
            <text:p>整形成另一個通緝犯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開窗即死</text:p>
          </table:table-cell>
          <table:table-cell office:value-type="string">
            <text:p>飛機/潛水艇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書本第50頁</text:p>
          </table:table-cell>
          <table:table-cell office:value-type="string">
            <text:p>記得是否借過這本書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自打巴掌</text:p>
          </table:table-cell>
          <table:table-cell office:value-type="string">
            <text:p>半夜醒來被蚊子吵醒,點了蚊香後睡著</text:p>
          </table:table-cell>
          <table:table-cell/>
          <table:table-cell office:value-type="string">
            <text:p>日常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分手吧</text:p>
          </table:table-cell>
          <table:table-cell office:value-type="string">
            <text:p>受困,分食第三人的手</text:p>
          </table:table-cell>
          <table:table-cell/>
          <table:table-cell office:value-type="string">
            <text:p>犯罪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崇拜爸爸的兒子</text:p>
          </table:table-cell>
          <table:table-cell office:value-type="string">
            <text:p>爸爸是魔術師，兒子切母親</text:p>
          </table:table-cell>
          <table:table-cell/>
          <table:table-cell office:value-type="string">
            <text:p>犯罪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女聲</text:p>
          </table:table-cell>
          <table:table-cell office:value-type="string">
            <text:p>藍芽連接斷開，手機掉在車上</text:p>
          </table:table-cell>
          <table:table-cell/>
          <table:table-cell office:value-type="string">
            <text:p>日常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6">2026/06/26</text:date>, <text:time>17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39S</meta:editing-duration>
    <meta:editing-cycles>17</meta:editing-cycles>
    <meta:generator>OpenOffice/4.1.16$Win32 OpenOffice.org_project/4116m3$Build-9816</meta:generator>
    <dc:date>2026-06-26T17:01:03.24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